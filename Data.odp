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8E0000042251B27C30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9.134cm" svg:x="1.4cm" svg:y="3.685cm" presentation:class="subtitle">
          <draw:text-box>
            <text:p><text:span text:style-name="T1">Modern Data Architectu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a xlink:href="https://docs.aws.amazon.com/architecture-diagrams/latest/modern-data-analytics-on-aws/modern-data-analytics-on-aws.html" xlink:type="simple">https://docs.aws.amazon.com/architecture-diagrams/latest/modern-data-analytics-on-aws/modern-data-analytics-on-aws.html</text:a><text:s/></text:p>
            </draw:text-box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1.823cm" svg:height="13.76cm" svg:x="3.386cm" svg:y="0.907cm">
          <draw:image xlink:href="Pictures/100000010000068E0000042251B27C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6:57:21.587236000</meta:creation-date>
    <dc:date>2026-05-19T18:04:19.793939000</dc:date>
    <meta:editing-duration>PT55M58S</meta:editing-duration>
    <meta:editing-cycles>2</meta:editing-cycles>
    <meta:generator>LibreOffice/26.2.1.2$MacOSX_AARCH64 LibreOffice_project/8399f6259d8c87f40e7255cdb3c9b958f5e08948</meta:generator>
    <meta:document-statistic meta:object-count="31"/>
  </office:meta>
</office:document-meta>
</file>